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/>
    </style:style>
    <style:style style:name="P2" style:family="paragraph" style:parent-style-name="Standard">
      <style:paragraph-properties fo:text-align="left" style:justify-single-word="false"/>
      <style:text-properties officeooo:rsid="0008c9e5" officeooo:paragraph-rsid="0008c9e5"/>
    </style:style>
    <style:style style:name="P3" style:family="paragraph" style:parent-style-name="Standard">
      <style:paragraph-properties fo:text-align="left" style:justify-single-word="false"/>
      <style:text-properties officeooo:rsid="000f3871" officeooo:paragraph-rsid="000f3871"/>
    </style:style>
    <style:style style:name="P4" style:family="paragraph" style:parent-style-name="Standard">
      <style:paragraph-properties fo:text-align="left" style:justify-single-word="false"/>
      <style:text-properties officeooo:rsid="0008c9e5" officeooo:paragraph-rsid="0009a550"/>
    </style:style>
    <style:style style:name="P5" style:family="paragraph" style:parent-style-name="Standard">
      <style:paragraph-properties fo:text-align="left" style:justify-single-word="false"/>
      <style:text-properties officeooo:rsid="0009a550" officeooo:paragraph-rsid="000c832c"/>
    </style:style>
    <style:style style:name="P6" style:family="paragraph" style:parent-style-name="Standard">
      <style:paragraph-properties fo:text-align="left" style:justify-single-word="false"/>
      <style:text-properties officeooo:rsid="00113112" officeooo:paragraph-rsid="00113112"/>
    </style:style>
    <style:style style:name="P7" style:family="paragraph" style:parent-style-name="Standard">
      <style:paragraph-properties fo:text-align="left" style:justify-single-word="false"/>
      <style:text-properties officeooo:rsid="0009a550" officeooo:paragraph-rsid="000b5a8c"/>
    </style:style>
    <style:style style:name="P8" style:family="paragraph" style:parent-style-name="Standard">
      <style:paragraph-properties fo:text-align="left" style:justify-single-word="false"/>
      <style:text-properties officeooo:rsid="000b5a8c" officeooo:paragraph-rsid="000b5a8c"/>
    </style:style>
    <style:style style:name="P9" style:family="paragraph" style:parent-style-name="Standard">
      <style:paragraph-properties fo:text-align="left" style:justify-single-word="false"/>
      <style:text-properties officeooo:rsid="000e321e" officeooo:paragraph-rsid="000e321e"/>
    </style:style>
    <style:style style:name="P10" style:family="paragraph" style:parent-style-name="Standard">
      <style:paragraph-properties fo:text-align="left" style:justify-single-word="false"/>
      <style:text-properties officeooo:rsid="000e321e" officeooo:paragraph-rsid="00113112"/>
    </style:style>
    <style:style style:name="P11" style:family="paragraph" style:parent-style-name="Standard">
      <style:paragraph-properties fo:text-align="left" style:justify-single-word="false"/>
      <style:text-properties officeooo:rsid="000b5a8c" officeooo:paragraph-rsid="000e321e"/>
    </style:style>
    <style:style style:name="P12" style:family="paragraph" style:parent-style-name="Standard">
      <style:paragraph-properties fo:text-align="left" style:justify-single-word="false"/>
      <style:text-properties officeooo:rsid="0010e843" officeooo:paragraph-rsid="0010e843"/>
    </style:style>
    <style:style style:name="T1" style:family="text">
      <style:text-properties officeooo:rsid="0008c9e5"/>
    </style:style>
    <style:style style:name="T2" style:family="text">
      <style:text-properties officeooo:rsid="000c9e87"/>
    </style:style>
    <style:style style:name="T3" style:family="text">
      <style:text-properties officeooo:rsid="00113112"/>
    </style:style>
    <style:style style:name="T4" style:family="text">
      <style:text-properties officeooo:rsid="000c832c"/>
    </style:style>
    <style:style style:name="T5" style:family="text">
      <style:text-properties officeooo:rsid="000b5a8c"/>
    </style:style>
    <style:style style:name="T6" style:family="text">
      <style:text-properties officeooo:rsid="0010e843"/>
    </style:style>
    <style:style style:name="T7" style:family="text">
      <style:text-properties officeooo:rsid="000f3871"/>
    </style:style>
    <style:style style:name="T8" style:family="text">
      <style:text-properties officeooo:rsid="000e3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ENTRETIEN avec Rogina BOTROS</text:span></text:p>
      <text:p text:style-name="P1"><text:span text:style-name="T1">7 juin 2026</text:span></text:p>
      <text:p text:style-name="P1"/>
      <text:p text:style-name="P2">Rogina aura bientôt 23 ans, <text:s/>vit au Caire, elle travaille dans le centre d’appel d’une banque en ligne.</text:p>
      <text:p text:style-name="P2">Depuis quelques mois, elle <text:span text:style-name="T2">assure la formation des agents.</text:span></text:p>
      <text:p text:style-name="P3">Elles titulaire d’une licence de littérature française obtenue en 2025</text:p>
      <text:p text:style-name="P4"/>
      <text:p text:style-name="P4">Elle a connu la mission par une autre volontaire Demiana, elle est interessée et souhaite apporter son aide <text:span text:style-name="T3">dans l’oeuvre du Diaconat.</text:span></text:p>
      <text:p text:style-name="P5">Elle <text:span text:style-name="T4">a vécu au</text:span> foyer Fowler ;</text:p>
      <text:p text:style-name="P5">Elle a eu de bons contacts avec les volontaires françaises, qui o<text:span text:style-name="T2">nt apporté une aide pour l’apprentissage du français et fait </text:span><text:s/>découvrir la culture.</text:p>
      <text:p text:style-name="P6">Elle est reconnaissante pour l’opportunité d’avoir appris le français et d’avoir pu suivre des études</text:p>
      <text:p text:style-name="P7">Dans le diaconat, elle souhaite faire connaissance avec des personnes âgées, <text:span text:style-name="T5">les aider dans leur vie quotidienne, </text:span>connaître leur histoire, et recevoir de leur sagesse et de leur expérience de vie</text:p>
      <text:p text:style-name="P8">elle se motivée pour cette mission, <text:span text:style-name="T6">voulant partager sa joie de vivre et son enthousiasme, et </text:span><text:s/>développper les relations humaines, connaître des personnes nouvelles, partager mode vie, et autre façon de penser, <text:span text:style-name="T6">apprendre sur elle-même.</text:span></text:p>
      <text:p text:style-name="P8"/>
      <text:p text:style-name="P9">Elle pense pouvoir s’adapter au mode de vie et aux contraintes qu’elles rencontrera</text:p>
      <text:p text:style-name="P10"><text:span text:style-name="T7">Le fait de vivre à Strasbourg lui fait un peur, elle se rassure en <text:s/></text:span><text:span text:style-name="T6">évoquant sa situation actuelle :</text:span></text:p>
      <text:p text:style-name="P10"><text:span text:style-name="T6">e</text:span>lle vit seule dans la capitale.</text:p>
      <text:p text:style-name="P11">Elle sait qu’elle sera loin de sa famille <text:span text:style-name="T8">qui réside en Haute Egypte, les contacts ne seront pas faciles.</text:span></text:p>
      <text:p text:style-name="P11"><text:span text:style-name="T8">Mais </text:span>les réseaux sociaux et moyens de communication lui permettront de rester en contact <text:span text:style-name="T8">avec les personnes qu’elle connaît au Caire.</text:span></text:p>
      <text:p text:style-name="P11"/>
      <text:p text:style-name="P12">Au retour de cette mission, elle en pourra pas reprendre son travail, elle souhaite s’orienter dans le domaine du tourisme ou de l’éducation.</text:p>
      <text:p text:style-name="P12"/>
      <text:p text:style-name="P6">Rogina s’est montrée à l’aise lors de l’entretien, parle très bien français.</text:p>
      <text:p text:style-name="P12"/>
      <text:p text:style-name="P12">Avis favorable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8T15:48:33.999595900</meta:creation-date>
    <dc:date>2026-06-08T17:34:42.921837400</dc:date>
    <meta:editing-duration>PT8M41S</meta:editing-duration>
    <meta:editing-cycles>2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20" meta:word-count="293" meta:character-count="1797" meta:non-whitespace-character-count="1518"/>
  </office:meta>
</office:document-meta>
</file>