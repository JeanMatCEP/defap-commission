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6c8" officeooo:paragraph-rsid="001846c8"/>
    </style:style>
    <style:style style:name="P2" style:family="paragraph" style:parent-style-name="Standard">
      <style:text-properties officeooo:rsid="0039c784" officeooo:paragraph-rsid="0039c784"/>
    </style:style>
    <style:style style:name="P3" style:family="paragraph" style:parent-style-name="Standard">
      <style:text-properties officeooo:rsid="002186e8" officeooo:paragraph-rsid="002186e8"/>
    </style:style>
    <style:style style:name="P4" style:family="paragraph" style:parent-style-name="Standard">
      <style:text-properties fo:font-style="normal" officeooo:rsid="002be5fe" officeooo:paragraph-rsid="002be5fe" style:font-style-asian="normal" style:font-style-complex="normal"/>
    </style:style>
    <style:style style:name="P5" style:family="paragraph" style:parent-style-name="Standard">
      <style:text-properties officeooo:rsid="00275a18" officeooo:paragraph-rsid="00275a18"/>
    </style:style>
    <style:style style:name="P6" style:family="paragraph" style:parent-style-name="Standard">
      <style:text-properties officeooo:rsid="001846c8" officeooo:paragraph-rsid="0031168b"/>
    </style:style>
    <style:style style:name="P7" style:family="paragraph" style:parent-style-name="Standard">
      <style:text-properties officeooo:rsid="002b6d45" officeooo:paragraph-rsid="002b6d45"/>
    </style:style>
    <style:style style:name="P8" style:family="paragraph" style:parent-style-name="Standard">
      <style:text-properties officeooo:rsid="001846c8" officeooo:paragraph-rsid="002b6d45"/>
    </style:style>
    <style:style style:name="P9" style:family="paragraph" style:parent-style-name="Standard">
      <style:text-properties officeooo:rsid="001b9be0" officeooo:paragraph-rsid="002be5fe"/>
    </style:style>
    <style:style style:name="P10" style:family="paragraph" style:parent-style-name="Standard">
      <style:text-properties officeooo:rsid="001846c8" officeooo:paragraph-rsid="002a371d"/>
    </style:style>
    <style:style style:name="P11" style:family="paragraph" style:parent-style-name="Standard">
      <style:text-properties officeooo:rsid="001e9057" officeooo:paragraph-rsid="001e9057"/>
    </style:style>
    <style:style style:name="P12" style:family="paragraph" style:parent-style-name="Standard">
      <style:text-properties officeooo:rsid="0029b073" officeooo:paragraph-rsid="0029b073"/>
    </style:style>
    <style:style style:name="P13" style:family="paragraph" style:parent-style-name="Standard">
      <style:text-properties officeooo:rsid="00189ed1" officeooo:paragraph-rsid="00189ed1"/>
    </style:style>
    <style:style style:name="P14" style:family="paragraph" style:parent-style-name="Standard">
      <style:text-properties officeooo:rsid="002370da" officeooo:paragraph-rsid="002370da"/>
    </style:style>
    <style:style style:name="P15" style:family="paragraph" style:parent-style-name="Standard">
      <style:text-properties officeooo:rsid="002a371d" officeooo:paragraph-rsid="002a371d"/>
    </style:style>
    <style:style style:name="P16" style:family="paragraph" style:parent-style-name="Standard">
      <style:text-properties officeooo:rsid="001e9057" officeooo:paragraph-rsid="00209396"/>
    </style:style>
    <style:style style:name="P17" style:family="paragraph" style:parent-style-name="Standard">
      <style:text-properties officeooo:rsid="00189ed1" officeooo:paragraph-rsid="002d516a"/>
    </style:style>
    <style:style style:name="P18" style:family="paragraph" style:parent-style-name="Standard">
      <style:text-properties officeooo:rsid="001b9be0" officeooo:paragraph-rsid="001b9be0"/>
    </style:style>
    <style:style style:name="P19" style:family="paragraph" style:parent-style-name="Standard">
      <style:text-properties officeooo:rsid="0037689a" officeooo:paragraph-rsid="0037689a"/>
    </style:style>
    <style:style style:name="P20" style:family="paragraph" style:parent-style-name="Standard">
      <style:paragraph-properties fo:text-align="left" style:justify-single-word="false"/>
      <style:text-properties officeooo:rsid="002186e8" officeooo:paragraph-rsid="002f8d6b"/>
    </style:style>
    <style:style style:name="P21" style:family="paragraph" style:parent-style-name="Standard">
      <style:paragraph-properties fo:text-align="left" style:justify-single-word="false"/>
      <style:text-properties officeooo:rsid="0020151e" officeooo:paragraph-rsid="002f8d6b"/>
    </style:style>
    <style:style style:name="P22" style:family="paragraph" style:parent-style-name="Standard">
      <style:text-properties officeooo:rsid="0020151e" officeooo:paragraph-rsid="001b9be0"/>
    </style:style>
    <style:style style:name="P23" style:family="paragraph" style:parent-style-name="Standard">
      <style:paragraph-properties fo:text-align="left" style:justify-single-word="false"/>
      <style:text-properties officeooo:rsid="002186e8" officeooo:paragraph-rsid="0020151e"/>
    </style:style>
    <style:style style:name="P24" style:family="paragraph" style:parent-style-name="Standard">
      <style:paragraph-properties fo:text-align="left" style:justify-single-word="false"/>
      <style:text-properties officeooo:rsid="0020151e" officeooo:paragraph-rsid="0020151e"/>
    </style:style>
    <style:style style:name="T1" style:family="text">
      <style:text-properties officeooo:rsid="001846c8"/>
    </style:style>
    <style:style style:name="T2" style:family="text">
      <style:text-properties officeooo:rsid="002d516a"/>
    </style:style>
    <style:style style:name="T3" style:family="text">
      <style:text-properties officeooo:rsid="00209396"/>
    </style:style>
    <style:style style:name="T4" style:family="text">
      <style:text-properties officeooo:rsid="00189ed1"/>
    </style:style>
    <style:style style:name="T5" style:family="text">
      <style:text-properties officeooo:rsid="0031168b"/>
    </style:style>
    <style:style style:name="T6" style:family="text">
      <style:text-properties officeooo:rsid="00274cb4"/>
    </style:style>
    <style:style style:name="T7" style:family="text">
      <style:text-properties officeooo:rsid="003415cb"/>
    </style:style>
    <style:style style:name="T8" style:family="text">
      <style:text-properties officeooo:rsid="002c6632"/>
    </style:style>
    <style:style style:name="T9" style:family="text">
      <style:text-properties officeooo:rsid="0039c784"/>
    </style:style>
    <style:style style:name="T10" style:family="text">
      <style:text-properties officeooo:rsid="00349448"/>
    </style:style>
    <style:style style:name="T11" style:family="text">
      <style:text-properties officeooo:rsid="002b6d45"/>
    </style:style>
    <style:style style:name="T12" style:family="text">
      <style:text-properties officeooo:rsid="00275a18"/>
    </style:style>
    <style:style style:name="T13" style:family="text">
      <style:text-properties officeooo:rsid="002895c6"/>
    </style:style>
    <style:style style:name="T14" style:family="text">
      <style:text-properties officeooo:rsid="00348f6c"/>
    </style:style>
    <style:style style:name="T15" style:family="text">
      <style:text-properties officeooo:rsid="0037689a"/>
    </style:style>
    <style:style style:name="T16" style:family="text">
      <style:text-properties officeooo:rsid="002a371d"/>
    </style:style>
    <style:style style:name="T17" style:family="text">
      <style:text-properties officeooo:rsid="0035ebb2"/>
    </style:style>
    <style:style style:name="T18" style:family="text">
      <style:text-properties officeooo:rsid="002eedf1"/>
    </style:style>
    <style:style style:name="T19" style:family="text">
      <style:text-properties officeooo:rsid="0029b073"/>
    </style:style>
    <style:style style:name="T20" style:family="text">
      <style:text-properties officeooo:rsid="0032537f"/>
    </style:style>
    <style:style style:name="T21" style:family="text">
      <style:text-properties officeooo:rsid="002f8d6b"/>
    </style:style>
    <style:style style:name="T22" style:family="text">
      <style:text-properties officeooo:rsid="0038e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</text:span><text:span text:style-name="T2">mp</text:span><text:span text:style-name="T1">te rendu entretien avec Amy Houbé <text:s text:c="3"/></text:span><text:span text:style-name="T3">3 juin 2026 <text:s text:c="5"/>Visio</text:span></text:p>
      <text:p text:style-name="Standard"/>
      <text:p text:style-name="P1">Amy a 23 ans <text:s/>originaire de Moselle <text:s text:c="3"/><text:span text:style-name="T4">(fille unique <text:s/>)</text:span> <text:s/><text:span text:style-name="T3">ses 2 parents sont professeurs</text:span></text:p>
      <text:p text:style-name="P1"><text:span text:style-name="T5">Elle vient de terminer</text:span> son <text:span text:style-name="T6">master de recherche en histoire à Sciences Po</text:span></text:p>
      <text:p text:style-name="P2">Elle est bilingue français anglais.</text:p>
      <text:p text:style-name="P3"/>
      <text:p text:style-name="P4">Pour postuler dans cette école, elle a bénéfici<text:span text:style-name="T7">é</text:span> du dispositif « égalité des chances », se rendant compte du chemin qu’elle a parcouru, elle souhait<text:span text:style-name="T8">e rendre ce qu’elle a reçu, en permettant à d’autres jeunes d’avoir accès à l’éducation, </text:span><text:span text:style-name="T9">à des études supérieures.</text:span> </text:p>
      <text:p text:style-name="P5"><text:span text:style-name="T10">E</text:span>lle <text:span text:style-name="T10">prévoit</text:span><text:span text:style-name="T8"> de</text:span> poser des candidatures pour faire un doctorat dans une université à l’étranger, de préférence aux USA, ou dans un pays anglophone</text:p>
      <text:p text:style-name="P5">Ces candidatures se feront à partir du début de 2027 <text:span text:style-name="T11">pour le mois de septembre.</text:span></text:p>
      <text:p text:style-name="P1"/>
      <text:p text:style-name="P1"><text:span text:style-name="T12">D</text:span>urant ce temps, <text:span text:style-name="T12">elle souhaite faire</text:span> quelque chose qui a du sens, <text:span text:style-name="T13">aider les autres, mettre ses compétences au service d’autres personnes </text:span></text:p>
      <text:p text:style-name="P1"/>
      <text:p text:style-name="P6"><text:span text:style-name="T11">Au cours de son cursus, elle</text:span> a fait une année d’étude dans une université au Tex<text:span text:style-name="T6">as, </text:span><text:span text:style-name="T5">qu’elle a apprécié</text:span><text:span text:style-name="T14">e</text:span><text:span text:style-name="T5">.</text:span></text:p>
      <text:p text:style-name="P6"><text:span text:style-name="T5">Elle a découvert un enseignement différent de celui de la France, </text:span><text:span text:style-name="T15">notamment dans la préparation des cours et les échanges avec les professeurs.</text:span></text:p>
      <text:p text:style-name="P7"><text:span text:style-name="T15">E</text:span>lle a rencontré des étudiants et des jeunes étrangers avec qui elle a noué des relations d’amitié </text:p>
      <text:p text:style-name="P8"><text:span text:style-name="T11">Elle a également voyagé </text:span><text:span text:style-name="T8">dans d’autres états </text:span></text:p>
      <text:p text:style-name="P1"/>
      <text:p text:style-name="P6"><text:span text:style-name="T5">Amy </text:span>a entendu parler du Defap <text:span text:style-name="T13">par une pasteure qui est en relation avec sa mère.</text:span></text:p>
      <text:p text:style-name="P6"><text:span text:style-name="T13">Elle a créé un groupe de Gospel qui </text:span><text:span text:style-name="T8">participe à</text:span><text:span text:style-name="T13"> des cultes qu’elle célébre</text:span></text:p>
      <text:p text:style-name="P9">Amy fait partie du conseil d’administration de l’association qui gère ce groupe.</text:p>
      <text:p text:style-name="P9"><text:span text:style-name="T10">E</text:span>lle participe au culte ; </text:p>
      <text:p text:style-name="P9"/>
      <text:p text:style-name="P10"><text:span text:style-name="T11">Dès l’adolescence, e</text:span><text:span text:style-name="T16">lle s’est engagée auprès de l’</text:span><text:span text:style-name="T7">Unicef</text:span><text:span text:style-name="T16">, plus tard dans une association d’aide aux enfants et aux familles défavorisées ;</text:span></text:p>
      <text:p text:style-name="P10"><text:span text:style-name="T17">E</text:span>lle une expérience de <text:span text:style-name="T16">soutien scolaire</text:span></text:p>
      <text:p text:style-name="P11">A particip<text:span text:style-name="T18">é</text:span> à l’organisation de l’accueil des étudiants étrangers de sciences Po</text:p>
      <text:p text:style-name="P12"/>
      <text:p text:style-name="P12"><text:span text:style-name="T15">En accomplissant c</text:span>ette mission de volontariat <text:span text:style-name="T15">elle associerait</text:span> son souhait de vivre une expérience de solidarité en action <text:s/>en lien avec la foi et de découvrir un pays dont elle rêve, <text:span text:style-name="T9">l’Egypte.</text:span></text:p>
      <text:p text:style-name="P13"><text:span text:style-name="T15">Elle voudrait en connaître la</text:span> culture, <text:span text:style-name="T15">la</text:span> vie quotidienne, <text:span text:style-name="T9">les traditions, les coutumes.</text:span></text:p>
      <text:p text:style-name="P11">A commencé à étudier l’arabe <text:span text:style-name="T19">pour faire d’éventuels voyages</text:span></text:p>
      <text:p text:style-name="P14"/>
      <text:p text:style-name="P15">Elle a pris contact avec une volontaire, Eléonore- <text:span text:style-name="T20">pour échanger avec elle sur son expérience, son vécu.</text:span></text:p>
      <text:p text:style-name="P16"/>
      <text:p text:style-name="P13"><text:span text:style-name="T7">Amy </text:span>est prête à enseigner dans toutes les matières, et entrainer à l’expression orale en français</text:p>
      <text:p text:style-name="P13">et accompagnement pour activités extrascolaires</text:p>
      <text:p text:style-name="P17"><text:span text:style-name="T18">Elle pense que </text:span>les deux situations sont interessan<text:span text:style-name="T7">tes</text:span> <text:span text:style-name="T2">lui permettront de partager ses connaissances et </text:span><text:span text:style-name="T18">d’accompagner les élèves, les jeunes dans leurs études et leur vie quotidienne en recevant de leu</text:span><text:span text:style-name="T21">r part…  en découvrant tout ce qu’ils peuvent lui transmettre, </text:span><text:span text:style-name="T22">dans les échanges, les discussions, et concernant leur </text:span><text:span text:style-name="T21"><text:s/>culture, </text:span><text:span text:style-name="T22">mode de vie, coutumes...</text:span></text:p>
      <text:p text:style-name="P18"/>
      <text:p text:style-name="P19">ses parents la soutiennent, et l’encouragent dans ce projet. </text:p>
      <text:p text:style-name="P18"><text:span text:style-name="T15">Sa mère</text:span> envisage de faire un voyage en Egypte.</text:p>
      <text:p text:style-name="P18"/>
      <text:p text:style-name="P20">Souriante, <text:span text:style-name="T5">volontaire, </text:span><text:s/>s’exprime très bie<text:span text:style-name="T21">n</text:span></text:p>
      <text:p text:style-name="P21">Avis favorable, semble prête à assurer ce service, </text:p>
      <text:p text:style-name="P22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20:59:18.252137200</meta:creation-date>
    <dc:date>2026-06-08T17:53:09.494329700</dc:date>
    <meta:editing-duration>PT1H10M49S</meta:editing-duration>
    <meta:editing-cycles>11</meta:editing-cycles>
    <meta:generator>LibreOffice/26.2.3.2$Windows_X86_64 LibreOffice_project/70e089b17412e4cb7773e41413306b17a2328c34</meta:generator>
    <meta:print-date>2026-06-08T10:14:19.507733300</meta:print-date>
    <meta:document-statistic meta:table-count="0" meta:image-count="0" meta:object-count="0" meta:page-count="1" meta:paragraph-count="30" meta:word-count="475" meta:character-count="2929" meta:non-whitespace-character-count="2459"/>
  </office:meta>
</office:document-meta>
</file>